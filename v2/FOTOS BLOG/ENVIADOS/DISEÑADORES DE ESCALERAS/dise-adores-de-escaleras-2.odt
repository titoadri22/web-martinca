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DDB403D2.jpg" manifest:media-type="image/jpeg"/>
  <manifest:file-entry manifest:full-path="Pictures/1000000000000400000002AB22B5A83A.png" manifest:media-type="image/png"/>
  <manifest:file-entry manifest:full-path="Pictures/10000000000002AB00000400FA55EB4B.jpg" manifest:media-type="image/jpeg"/>
  <manifest:file-entry manifest:full-path="Pictures/10000000000001B00000024EBB737CA0.jpg" manifest:media-type="image/jpeg"/>
  <manifest:file-entry manifest:full-path="Pictures/10000001000000F10000013B10542C5F.png" manifest:media-type="image/png"/>
  <manifest:file-entry manifest:full-path="Pictures/10000000000007D00000051A807D014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494cm" style:contextual-spacing="false" fo:line-height="100%"/>
    </style:style>
    <style:style style:name="P2" style:family="paragraph" style:parent-style-name="Standard">
      <style:paragraph-properties fo:margin-top="0.494cm" fo:margin-bottom="0.494cm" style:contextual-spacing="false" fo:line-height="100%"/>
    </style:style>
    <style:style style:name="P3" style:family="paragraph">
      <loext:graphic-properties draw:fill="none"/>
      <style:paragraph-properties fo:text-align="center"/>
    </style:style>
    <style:style style:name="P4" style:family="paragraph" style:parent-style-name="Standard">
      <style:paragraph-properties fo:margin-top="0.494cm" fo:margin-bottom="0.494cm" style:contextual-spacing="false" fo:line-height="100%" fo:text-align="center" style:justify-single-word="false"/>
      <style:text-properties officeooo:paragraph-rsid="001d8630" style:font-name-asian="Times New Roman1" style:language-asian="es" style:country-asian="ES" style:font-name-complex="Calibri1"/>
    </style:style>
    <style:style style:name="P5" style:family="paragraph" style:parent-style-name="Standard">
      <style:paragraph-properties fo:margin-top="0.494cm" fo:margin-bottom="0.494cm" style:contextual-spacing="false" fo:line-height="100%"/>
      <style:text-properties officeooo:paragraph-rsid="001d8630" style:font-name-asian="Times New Roman1" style:language-asian="es" style:country-asian="ES" style:font-name-complex="Calibri1"/>
    </style:style>
    <style:style style:name="P6" style:family="paragraph" style:parent-style-name="Standard">
      <style:paragraph-properties fo:margin-top="0.494cm" fo:margin-bottom="0.494cm" style:contextual-spacing="false" fo:line-height="100%"/>
      <style:text-properties style:font-name-asian="Times New Roman1" style:language-asian="es" style:country-asian="ES" style:font-name-complex="Calibri1"/>
    </style:style>
    <style:style style:name="P7" style:family="paragraph" style:parent-style-name="Standard">
      <style:paragraph-properties fo:margin-top="0.494cm" fo:margin-bottom="0.494cm" style:contextual-spacing="false" fo:line-height="100%" fo:text-align="center" style:justify-single-word="false"/>
      <style:text-properties fo:font-style="italic" fo:font-weight="bold" style:font-name-asian="Times New Roman1" style:language-asian="es" style:country-asian="ES" style:font-style-asian="italic" style:font-weight-asian="bold" style:font-name-complex="Calibri1" style:font-style-complex="italic" style:font-weight-complex="bold"/>
    </style:style>
    <style:style style:name="P8" style:family="paragraph" style:parent-style-name="Standard">
      <style:paragraph-properties fo:margin-top="0.494cm" fo:margin-bottom="0.494cm" style:contextual-spacing="false" fo:line-height="100%" fo:text-align="center" style:justify-single-word="false"/>
      <style:text-properties fo:font-style="italic" fo:font-weight="bold" officeooo:rsid="001d8630" officeooo:paragraph-rsid="001d8630" style:font-name-asian="Times New Roman1" style:language-asian="es" style:country-asian="ES" style:font-style-asian="italic" style:font-weight-asian="bold" style:font-name-complex="Calibri1" style:font-style-complex="italic" style:font-weight-complex="bold"/>
    </style:style>
    <style:style style:name="P9" style:family="paragraph" style:parent-style-name="Standard">
      <style:paragraph-properties fo:margin-top="0.494cm" fo:margin-bottom="0.494cm" style:contextual-spacing="false" fo:line-height="100%" fo:text-align="center" style:justify-single-word="false"/>
      <style:text-properties fo:font-style="italic" fo:font-weight="bold" officeooo:rsid="001ee1b3" officeooo:paragraph-rsid="001ee1b3" style:font-name-asian="Times New Roman1" style:language-asian="es" style:country-asian="ES" style:font-style-asian="italic" style:font-weight-asian="bold" style:font-name-complex="Calibri1" style:font-style-complex="italic" style:font-weight-complex="bold"/>
    </style:style>
    <style:style style:name="T1" style:family="text">
      <style:text-properties fo:font-size="14pt" fo:font-weight="bold" style:font-name-asian="Times New Roman1" style:font-size-asian="14pt" style:language-asian="es" style:country-asian="ES" style:font-weight-asian="bold" style:font-name-complex="Calibri1" style:font-size-complex="14pt"/>
    </style:style>
    <style:style style:name="T2" style:family="text">
      <style:text-properties fo:font-size="12pt" fo:font-weight="bold" style:font-name-asian="Times New Roman1" style:font-size-asian="12pt" style:language-asian="es" style:country-asian="ES" style:font-weight-asian="bold" style:font-name-complex="Calibri1" style:font-size-complex="12pt"/>
    </style:style>
    <style:style style:name="T3" style:family="text">
      <style:text-properties style:font-name-asian="Times New Roman1" style:language-asian="es" style:country-asian="ES" style:font-name-complex="Calibri1"/>
    </style:style>
    <style:style style:name="T4" style:family="text">
      <style:text-properties fo:font-style="italic" fo:font-weight="bold" officeooo:rsid="001d8630" style:font-style-asian="italic" style:font-weight-asian="bold" style:font-style-complex="italic" style:font-weight-complex="bold"/>
    </style:style>
    <style:style style:name="T5" style:family="text">
      <style:text-properties officeooo:rsid="001d86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94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ISEÑADORES DE ESCALERAS MAS FAMOSOS: INSPIRACION PARA LA ARQUITECTURA MODERNA</text:span><text:span text:style-name="T1"/></text:p>
      <text:p text:style-name="P2" loext:marker-style-name="T2"><text:span text:style-name="T2">¿Por Qué es Importante el Diseño de Escaleras?</text:span><text:span text:style-name="T2"/></text:p>
      <text:p text:style-name="P2" loext:marker-style-name="T3"><text:span text:style-name="T3"><text:tab/>El diseño de escaleras no es solo una cuestión estética. También implica consideraciones de seguridad, funcionalidad y ergonomía, especialmente en edificios comerciales y residenciales. </text:span><text:span text:style-name="T3"/></text:p>
      <text:p text:style-name="P2" loext:marker-style-name="T3"><text:span text:style-name="T3"><text:tab/>Los diseñadores más famosos saben cómo equilibrar la belleza visual con la seguridad estructural y el confort de uso.</text:span><text:span text:style-name="T3"/></text:p>
      <text:p text:style-name="P1" loext:marker-style-name="T3"><draw:frame text:anchor-type="as-char" svg:y="-19.114cm" draw:z-index="0" draw:style-name="gr1" draw:text-style-name="P3" svg:width="13.516cm" svg:height="18.837cm"><draw:image xlink:href="Pictures/10000000000004B000000640DDB403D2.jpg" xlink:type="simple" xlink:show="embed" xlink:actuate="onLoad" draw:mime-type="image/jpeg"><text:p/></draw:image></draw:frame></text:p>
      <text:p text:style-name="P4"><text:span text:style-name="T4">Foto de Martinca</text:span><text:tab/></text:p>
      <text:p text:style-name="P5" loext:marker-style-name="T3"><text:soft-page-break/></text:p>
      <text:p text:style-name="P5" loext:marker-style-name="T3">Además, en términos de diseño interior, una escalera bien diseñada puede convertirse en el punto focal de cualquier espacio. <text:span text:style-name="T3"/></text:p>
      <text:p text:style-name="P2" loext:marker-style-name="T3"><text:span text:style-name="T3"><text:tab/>Si bien los estilos varían desde lo minimalista hasta lo exuberante, todos los grandes diseñadores entienden la importancia de la cerrajería como un componente crucial para garantizar la seguridad y estabilidad de sus creaciones.</text:span><text:span text:style-name="T3"/></text:p>
      <text:p text:style-name="P2" loext:marker-style-name="T3"><text:span text:style-name="T3"><text:tab/>El diseño de escaleras es una forma de arte en sí misma, y los arquitectos más famosos del mundo han demostrado cómo transformar este elemento esencial en una verdadera obra de arte. </text:span><text:span text:style-name="T3"/></text:p>
      <text:p text:style-name="P2" loext:marker-style-name="T3"><text:span text:style-name="T3"><text:tab/>Desde las líneas vanguardistas de Santiago Calatrava hasta las formas fluidas de Zaha Hadid, cada diseñador aporta una visión única al concepto de escalera.</text:span><text:span text:style-name="T3"/></text:p>
      <text:p text:style-name="P2" loext:marker-style-name="T3"><text:span text:style-name="T3"><text:tab/>En este artículo, exploraremos los diseñadores de escaleras más famosos del mundo, cuya creatividad ha dejado una huella imborrable en el diseño arquitectónico. Además, aprenderás cómo estos diseñadores han combinado arte, funcionalidad y seguridad en sus creaciones.</text:span><text:span text:style-name="T3"/></text:p>
      <text:p text:style-name="P2" loext:marker-style-name="T2"><text:span text:style-name="T2">1. Santiago Calatrava: Escaleras Esculturales</text:span><text:span text:style-name="T2"/></text:p>
      <text:p text:style-name="P2" loext:marker-style-name="T3"><text:span text:style-name="T3"><text:tab/>Santiago Calatrava, conocido por su enfoque vanguardista en la arquitectura, ha diseñado algunas de las escaleras más icónicas del mundo. Sus creaciones se caracterizan por líneas fluidas y un estilo futurista que hace que las escaleras parezcan esculturas en movimiento. </text:span><text:span text:style-name="T3"/></text:p>
      <text:p text:style-name="P6" loext:marker-style-name="T3"><text:tab/>Un ejemplo claro de su genialidad es la escalera en el edificio Turning Torso en Malmö, Suecia, donde las curvas y ángulos precisos desafían las normas tradicionales del diseño.</text:p>
      <text:p text:style-name="P6" loext:marker-style-name="T3"><draw:frame draw:style-name="fr1" draw:name="Imagen1" text:anchor-type="char" svg:width="15cm" svg:height="10.005cm" draw:z-index="1"><draw:image xlink:href="Pictures/1000000000000400000002AB22B5A83A.png" xlink:type="simple" xlink:show="embed" xlink:actuate="onLoad" draw:mime-type="image/png"/></draw:frame></text:p>
      <text:p text:style-name="P7"><text:span text:style-name="T5">Foto de </text:span>Flickr</text:p>
      <text:p text:style-name="P6" loext:marker-style-name="T3"><text:soft-page-break/></text:p>
      <text:p text:style-name="P2" loext:marker-style-name="T2"><text:span text:style-name="T2">2. Zaha Hadid: Elegancia Orgánica en el Diseño de Escaleras</text:span><text:span text:style-name="T2"/></text:p>
      <text:p text:style-name="P6" loext:marker-style-name="T3"><text:tab/>La aclamada arquitecta Zaha Hadid es otra figura importante en el diseño de escaleras. Hadid introdujo formas curvas y orgánicas que fluyen sin esfuerzo a lo largo de sus proyectos. <text:tab/>Su enfoque deconstructivista se refleja en la fluidez de las escaleras, como las del Dongdaemun Design Plaza en Seúl, donde las líneas suaves y continuas integran las escaleras en el diseño general del edificio.</text:p>
      <text:p text:style-name="P6" loext:marker-style-name="T3"><draw:frame draw:style-name="fr2" draw:name="Imagen2" text:anchor-type="char" svg:x="3.283cm" svg:y="0.199cm" svg:width="8.867cm" svg:height="12.111cm" draw:z-index="2"><draw:image xlink:href="Pictures/10000000000001B00000024EBB737CA0.jpg" xlink:type="simple" xlink:show="embed" xlink:actuate="onLoad" draw:mime-type="image/jpeg"/></draw:frame></text:p>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8">Foto de Noticias de Arquitectura</text:p>
      <text:p text:style-name="P6" loext:marker-style-name="T3"/>
      <text:p text:style-name="P6" loext:marker-style-name="T3"/>
      <text:p text:style-name="P2" loext:marker-style-name="T2"><text:span text:style-name="T2">3. </text:span><text:bookmark-start text:name="_GoBack"/><text:span text:style-name="T2">Rem Koolhaas</text:span><text:bookmark-end text:name="_GoBack"/><text:span text:style-name="T2">: Funcionalidad Minimalista</text:span><text:span text:style-name="T2"/></text:p>
      <text:p text:style-name="P2" loext:marker-style-name="T3"><text:span text:style-name="T3"><text:tab/>El arquitecto holandés Rem Koolhaas es conocido por su enfoque minimalista y funcional en el diseño de escaleras. Koolhaas crea escaleras que, aunque visualmente simples, son complejas en términos estructurales. </text:span><text:span text:style-name="T3"/></text:p>
      <text:p text:style-name="P6" loext:marker-style-name="T3"><text:tab/>Un ejemplo destacado es la escalera de la Casa Bordeaux en Francia, donde la simplicidad y la eficiencia en el uso del espacio son clave.</text:p>
      <text:p text:style-name="P6" loext:marker-style-name="T3"/>
      <text:p text:style-name="P6" loext:marker-style-name="T3"/>
      <text:p text:style-name="P6" loext:marker-style-name="T3"><text:soft-page-break/></text:p>
      <text:p text:style-name="P6" loext:marker-style-name="T3"><draw:frame draw:style-name="fr3" draw:name="Imagen3" text:anchor-type="char" svg:width="6.376cm" svg:height="8.334cm" draw:z-index="3"><draw:image xlink:href="Pictures/10000001000000F10000013B10542C5F.png" xlink:type="simple" xlink:show="embed" xlink:actuate="onLoad" draw:mime-type="image/png"/></draw:frame></text:p>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8">Foto de AD España</text:p>
      <text:p text:style-name="P7"/>
      <text:p text:style-name="P2" loext:marker-style-name="T2"><text:span text:style-name="T2">4. Frank Lloyd Wright: Escaleras Integradas en la Naturaleza</text:span><text:span text:style-name="T2"/></text:p>
      <text:p text:style-name="P2" loext:marker-style-name="T3"><text:span text:style-name="T3"><text:tab/>Frank Lloyd Wright es famoso por su capacidad de integrar la arquitectura con la naturaleza. Las escaleras que diseñó son un reflejo de esta filosofía, como las que se encuentran en la icónica Casa de la Cascada (Fallingwater). </text:span><text:span text:style-name="T3"/></text:p>
      <text:p text:style-name="P6" loext:marker-style-name="T3"><text:tab/>En este proyecto, las escaleras no solo conectan los diferentes niveles de la casa, sino que también parecen fluir con el paisaje circundante, creando una experiencia de inmersión total.</text:p>
      <text:p text:style-name="P6" loext:marker-style-name="T3"><draw:frame draw:style-name="fr2" draw:name="Imagen4" text:anchor-type="char" svg:x="4.235cm" svg:y="-0.143cm" svg:width="6.177cm" svg:height="9.26cm" draw:z-index="4"><draw:image xlink:href="Pictures/10000000000002AB00000400FA55EB4B.jpg" xlink:type="simple" xlink:show="embed" xlink:actuate="onLoad" draw:mime-type="image/jpeg"/></draw:frame></text:p>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9">Foto de angelsferrerb - Wordpress.com </text:p>
      <text:p text:style-name="P6" loext:marker-style-name="T3"><text:soft-page-break/></text:p>
      <text:p text:style-name="P6" loext:marker-style-name="T3"/>
      <text:p text:style-name="P2" loext:marker-style-name="T2"><text:span text:style-name="T2">5. Eero Saarinen: Innovación en Espacios Públicos</text:span><text:span text:style-name="T2"/></text:p>
      <text:p text:style-name="P2" loext:marker-style-name="T3"><text:span text:style-name="T3"><text:tab/>El finlandés Eero Saarinen fue un innovador en el diseño de escaleras para grandes espacios públicos. Sus escaleras son famosas por su diseño funcional y estético, como las del TWA Flight Center en el Aeropuerto JFK de Nueva York.</text:span><text:span text:style-name="T3"/></text:p>
      <text:p text:style-name="P2" loext:marker-style-name="T3"><text:span text:style-name="T3"><text:tab/>Saarinen utilizó formas geométricas y materiales innovadores para crear escaleras que complementaran sus estructuras arquitectónicas futuristas.</text:span><text:span text:style-name="T3"/></text:p>
      <text:p text:style-name="P6" loext:marker-style-name="T3"/>
      <text:p text:style-name="P2" loext:marker-style-name="T3"><text:span text:style-name="T3"><text:tab/>Si estás buscando inspiración para un proyecto de escaleras o simplemente te interesa el diseño arquitectónico, conocer el trabajo de estos diseñadores puede ofrecerte nuevas perspectivas. </text:span><text:span text:style-name="T3"/></text:p>
      <text:p text:style-name="P6" loext:marker-style-name="T3"><text:tab/>Además, si necesitas mejorar la seguridad de tus escaleras, no dudes en contactar a un cerrajero profesional que te ayude a asegurar tu hogar o negocio con las mejores cerraduras y sistemas de seguridad.</text:p>
      <text:p text:style-name="P6" loext:marker-style-name="T3"/>
      <text:p text:style-name="P6" loext:marker-style-name="T3"><draw:frame draw:style-name="fr2" draw:name="Imagen5" text:anchor-type="char" svg:x="0cm" svg:y="0.064cm" svg:width="15cm" svg:height="9.795cm" draw:z-index="5"><draw:image xlink:href="Pictures/10000000000007D00000051A807D0140.jpg" xlink:type="simple" xlink:show="embed" xlink:actuate="onLoad" draw:mime-type="image/jpeg"/></draw:frame></text:p>
      <text:p text:style-name="P9">Foto de www.archdaily.c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loext:linked-style-name="Título_20_1_20_Car" style:default-outline-level="1"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gallery-slide-article_5f__5f_caption-content" style:display-name="gallery-slide-article__caption-conten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om-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image-photo-credit"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mod-date" style:family="text" style:parent-style-name="Default_20_Paragraph_20_Font"/>
    <style:style style:name="com-partner" style:family="text" style:parent-style-name="Default_20_Paragraph_20_Font"/>
    <style:style style:name="com-text"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basewrap-sc-urhls" style:family="text" style:parent-style-name="Default_20_Paragraph_20_Font"/>
    <style:style style:name="spanwrapper-kgougj" style:family="text" style:parent-style-name="Default_20_Paragraph_20_Font"/>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mercial</meta:initial-creator>
    <meta:editing-cycles>4</meta:editing-cycles>
    <meta:creation-date>2024-10-17T04:16:00</meta:creation-date>
    <dc:date>2025-04-08T12:04:17.490910900</dc:date>
    <meta:editing-duration>PT50M27S</meta:editing-duration>
    <meta:generator>LibreOffice/25.2.1.2$Windows_X86_64 LibreOffice_project/d3abf4aee5fd705e4a92bba33a32f40bc4e56f49</meta:generator>
    <meta:document-statistic meta:table-count="0" meta:image-count="5" meta:object-count="0" meta:page-count="5" meta:paragraph-count="32" meta:word-count="636" meta:character-count="4173" meta:non-whitespace-character-count="3541"/>
    <meta:user-defined meta:name="AppVersion">14.0000</meta:user-defined>
    <meta:template xlink:type="simple" xlink:actuate="onRequest" xlink:title="Normal" xlink:href=""/>
  </office:meta>
</office:document-meta>
</file>